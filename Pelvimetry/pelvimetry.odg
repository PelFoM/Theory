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solid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9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8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3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035cm"/>
    </style:style>
    <style:style style:name="gr13" style:family="graphic" style:parent-style-name="objectwithoutfill">
      <style:graphic-properties svg:stroke-width="0cm" svg:stroke-color="#000000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4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9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1cm" fo:min-width="1.5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1cm" fo:min-width="1.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1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1cm" fo:min-width="1.4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1cm" fo:min-width="1.0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1cm" fo:min-width="0.98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1cm" fo:min-width="1.15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1cm" fo:min-width="1.07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3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1cm" fo:min-width="1.1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1cm" fo:min-width="1.0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1cm" fo:min-width="2.2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1cm" fo:min-width="2.203cm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text-properties fo:font-size="24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style:font-size-asian="12pt" style:font-size-complex="12pt"/>
    </style:style>
    <style:style style:name="T1" style:family="text">
      <style:text-properties fo:font-size="24pt" style:font-size-asian="12pt" style:font-size-complex="12pt"/>
    </style:style>
    <style:style style:name="T2" style:family="text">
      <style:text-properties style:text-position="sub 58%" fo:font-size="24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5.457cm" svg:height="19.999cm" svg:x="4.103cm" svg:y="0.804cm">
          <draw:image xlink:href="../pelvimetry_lateral.png" xlink:type="simple" xlink:show="embed" xlink:actuate="onLoad">
            <text:p/>
          </draw:image>
        </draw:frame>
        <draw:circle draw:style-name="gr2" draw:text-style-name="P1" draw:layer="layout" svg:width="0.2cm" svg:height="0.2cm" svg:x="4.878cm" svg:y="15.934cm">
          <text:p/>
        </draw:circle>
        <draw:circle draw:style-name="gr2" draw:text-style-name="P1" draw:layer="layout" svg:width="0.2cm" svg:height="0.2cm" svg:x="6.06cm" svg:y="16.034cm">
          <text:p/>
        </draw:circle>
        <draw:circle draw:style-name="gr2" draw:text-style-name="P1" draw:layer="layout" svg:width="0.2cm" svg:height="0.2cm" svg:x="7.789cm" svg:y="18.809cm">
          <text:p/>
        </draw:circle>
        <draw:circle draw:style-name="gr2" draw:text-style-name="P1" draw:layer="layout" svg:width="0.2cm" svg:height="0.2cm" svg:x="12.9cm" svg:y="19.445cm">
          <text:p/>
        </draw:circle>
        <draw:circle draw:style-name="gr2" draw:text-style-name="P1" draw:layer="layout" svg:width="0.2cm" svg:height="0.2cm" svg:x="15cm" svg:y="13.609cm">
          <text:p/>
        </draw:circle>
        <draw:circle draw:style-name="gr2" draw:text-style-name="P1" draw:layer="layout" svg:width="0.2cm" svg:height="0.2cm" svg:x="16.477cm" svg:y="15.2cm">
          <text:p/>
        </draw:circle>
        <draw:frame draw:style-name="gr3" draw:text-style-name="P2" draw:layer="layout" svg:width="3.038cm" svg:height="1.195cm" draw:transform="rotate (0.38397243543868) translate (11.52cm 16.56cm)">
          <draw:text-box>
            <text:p><text:span text:style-name="T1">SCIPP</text:span></text:p>
          </draw:text-box>
        </draw:frame>
        <draw:frame draw:style-name="gr4" draw:text-style-name="P2" draw:layer="layout" svg:width="1.675cm" svg:height="1.195cm" svg:x="9.3cm" svg:y="4.4cm">
          <draw:text-box>
            <text:p><text:span text:style-name="T1">PR</text:span></text:p>
          </draw:text-box>
        </draw:frame>
        <draw:frame draw:style-name="gr5" draw:text-style-name="P2" draw:layer="layout" svg:width="1.488cm" svg:height="1.195cm" svg:x="15.838cm" svg:y="15.566cm">
          <draw:text-box>
            <text:p><text:span text:style-name="T1">SJ</text:span></text:p>
          </draw:text-box>
        </draw:frame>
        <draw:frame draw:style-name="gr6" draw:text-style-name="P2" draw:layer="layout" svg:width="1.302cm" svg:height="1.195cm" svg:x="15.064cm" svg:y="13.3cm">
          <draw:text-box>
            <text:p><text:span text:style-name="T1">IS</text:span></text:p>
          </draw:text-box>
        </draw:frame>
        <draw:frame draw:style-name="gr7" draw:text-style-name="P2" draw:layer="layout" svg:width="1.256cm" svg:height="1.195cm" svg:x="12.961cm" svg:y="19.436cm">
          <draw:text-box>
            <text:p><text:span text:style-name="T1">IT</text:span></text:p>
          </draw:text-box>
        </draw:frame>
        <draw:frame draw:style-name="gr8" draw:text-style-name="P2" draw:layer="layout" svg:width="2.191cm" svg:height="1.195cm" svg:x="3.568cm" svg:y="14.8cm">
          <draw:text-box>
            <text:p><text:span text:style-name="T1">PSA</text:span></text:p>
          </draw:text-box>
        </draw:frame>
        <draw:frame draw:style-name="gr8" draw:text-style-name="P2" draw:layer="layout" svg:width="2.191cm" svg:height="1.195cm" svg:x="6.168cm" svg:y="16cm">
          <draw:text-box>
            <text:p><text:span text:style-name="T1">PSP</text:span></text:p>
          </draw:text-box>
        </draw:frame>
        <draw:frame draw:style-name="gr9" draw:text-style-name="P2" draw:layer="layout" svg:width="1.865cm" svg:height="1.195cm" svg:x="7.93cm" svg:y="18.877cm">
          <draw:text-box>
            <text:p><text:span text:style-name="T1">PSI</text:span></text:p>
          </draw:text-box>
        </draw:frame>
        <draw:frame draw:style-name="gr10" draw:text-style-name="P2" draw:layer="layout" svg:width="2.335cm" svg:height="1.195cm" draw:transform="rotate (0.83775804095712) translate (11.056cm 9.304cm)">
          <draw:text-box>
            <text:p><text:span text:style-name="T1">COE</text:span></text:p>
          </draw:text-box>
        </draw:frame>
        <draw:circle draw:style-name="gr2" draw:text-style-name="P1" draw:layer="layout" svg:width="0.2cm" svg:height="0.2cm" svg:x="10.5cm" svg:y="5.527cm">
          <text:p/>
        </draw:circle>
        <draw:circle draw:style-name="gr2" draw:text-style-name="P1" draw:layer="layout" svg:width="0.2cm" svg:height="0.2cm" svg:x="4.2cm" svg:y="9.134cm">
          <text:p/>
        </draw:circle>
        <draw:circle draw:style-name="gr2" draw:text-style-name="P1" draw:layer="layout" svg:width="0.2cm" svg:height="0.2cm" svg:x="6.853cm" svg:y="3.134cm">
          <text:p/>
        </draw:circle>
        <draw:frame draw:style-name="gr11" draw:text-style-name="P4" draw:layer="layout" svg:width="1.628cm" svg:height="1.195cm" svg:x="2.662cm" svg:y="8.4cm">
          <draw:text-box>
            <text:p text:style-name="P3"><text:span text:style-name="T1">BS</text:span></text:p>
          </draw:text-box>
        </draw:frame>
        <draw:circle draw:style-name="gr2" draw:text-style-name="P1" draw:layer="layout" svg:width="0.2cm" svg:height="0.2cm" svg:x="17.14cm" svg:y="10cm">
          <text:p/>
        </draw:circle>
        <draw:frame draw:style-name="gr12" draw:text-style-name="P4" draw:layer="layout" svg:width="1.535cm" svg:height="1.195cm" svg:x="16.7cm" svg:y="10.318cm">
          <draw:text-box>
            <text:p text:style-name="P3"><text:span text:style-name="T1">S3</text:span></text:p>
          </draw:text-box>
        </draw:frame>
        <draw:line draw:style-name="gr13" draw:text-style-name="P1" draw:layer="layout" svg:x1="7.9cm" svg:y1="18.9cm" svg:x2="16.6cm" svg:y2="15.3cm">
          <text:p/>
        </draw:line>
        <draw:frame draw:style-name="gr14" draw:text-style-name="P4" draw:layer="layout" svg:width="1.912cm" svg:height="1.195cm" draw:transform="rotate (0.48869219055832) translate (11.459cm 12.303cm)">
          <draw:text-box>
            <text:p text:style-name="P3"><text:span text:style-name="T1">CW</text:span></text:p>
          </draw:text-box>
        </draw:frame>
        <draw:circle draw:style-name="gr2" draw:text-style-name="P1" draw:layer="layout" svg:width="0.2cm" svg:height="0.2cm" svg:x="17.169cm" svg:y="1.953cm">
          <text:p/>
        </draw:circle>
        <draw:frame draw:style-name="gr15" draw:text-style-name="P2" draw:layer="layout" svg:width="1.442cm" svg:height="1.195cm" svg:x="17.371cm" svg:y="1.6cm">
          <draw:text-box>
            <text:p><text:span text:style-name="T1">L5</text:span></text:p>
          </draw:text-box>
        </draw:frame>
        <draw:frame draw:style-name="gr4" draw:text-style-name="P4" draw:layer="layout" svg:width="1.675cm" svg:height="1.195cm" svg:x="5.815cm" svg:y="2.2cm">
          <draw:text-box>
            <text:p text:style-name="P3"><text:span text:style-name="T1">BC</text:span></text:p>
          </draw:text-box>
        </draw:frame>
        <draw:line draw:style-name="gr13" draw:text-style-name="P1" draw:layer="layout" svg:x1="5cm" svg:y1="16cm" svg:x2="17.3cm" svg:y2="2cm">
          <text:p/>
        </draw:line>
        <draw:line draw:style-name="gr13" draw:text-style-name="P1" draw:layer="layout" svg:x1="6.2cm" svg:y1="16.05cm" svg:x2="10.55cm" svg:y2="5.65cm">
          <text:p/>
        </draw:line>
        <draw:line draw:style-name="gr13" draw:text-style-name="P1" draw:layer="layout" svg:x1="6.2cm" svg:y1="16.1cm" svg:x2="17.2cm" svg:y2="10.1cm">
          <text:p/>
        </draw:line>
        <draw:frame draw:style-name="gr1" draw:text-style-name="P1" draw:layer="layout" svg:width="25.111cm" svg:height="19.912cm" svg:x="24.898cm" svg:y="0.804cm">
          <draw:image xlink:href="../pelvimetry_frontal.png" xlink:type="simple" xlink:show="embed" xlink:actuate="onLoad">
            <text:p/>
          </draw:image>
        </draw:frame>
        <draw:circle draw:style-name="gr2" draw:text-style-name="P1" draw:layer="layout" svg:width="0.2cm" svg:height="0.2cm" svg:x="25.001cm" svg:y="3.134cm">
          <text:p/>
        </draw:circle>
        <draw:frame draw:style-name="gr16" draw:text-style-name="P4" draw:layer="layout" svg:width="2.031cm" svg:height="1.471cm" svg:x="24.463cm" svg:y="1.8cm">
          <draw:text-box>
            <text:p text:style-name="P3"><text:span text:style-name="T1">BC</text:span><text:span text:style-name="T2">R</text:span></text:p>
          </draw:text-box>
        </draw:frame>
        <draw:circle draw:style-name="gr2" draw:text-style-name="P1" draw:layer="layout" svg:width="0.2cm" svg:height="0.2cm" svg:x="49.502cm" svg:y="3.134cm">
          <text:p/>
        </draw:circle>
        <draw:frame draw:style-name="gr17" draw:text-style-name="P4" draw:layer="layout" svg:width="1.95cm" svg:height="1.471cm" svg:x="48.364cm" svg:y="1.9cm">
          <draw:text-box>
            <text:p text:style-name="P3"><text:span text:style-name="T1">BC</text:span><text:span text:style-name="T2">L</text:span></text:p>
          </draw:text-box>
        </draw:frame>
        <draw:frame draw:style-name="gr4" draw:text-style-name="P2" draw:layer="layout" svg:width="1.675cm" svg:height="1.195cm" svg:x="36.25cm" svg:y="5.7cm">
          <draw:text-box>
            <text:p><text:span text:style-name="T1">PR</text:span></text:p>
          </draw:text-box>
        </draw:frame>
        <draw:circle draw:style-name="gr2" draw:text-style-name="P1" draw:layer="layout" svg:width="0.2cm" svg:height="0.2cm" svg:x="37.35cm" svg:y="5.527cm">
          <text:p/>
        </draw:circle>
        <draw:circle draw:style-name="gr2" draw:text-style-name="P1" draw:layer="layout" svg:width="0.2cm" svg:height="0.2cm" svg:x="27.3cm" svg:y="9.134cm">
          <text:p/>
        </draw:circle>
        <draw:frame draw:style-name="gr18" draw:text-style-name="P4" draw:layer="layout" svg:width="1.984cm" svg:height="1.471cm" svg:x="26.862cm" svg:y="7.9cm">
          <draw:text-box>
            <text:p text:style-name="P3"><text:span text:style-name="T1">BS</text:span><text:span text:style-name="T2">R</text:span></text:p>
          </draw:text-box>
        </draw:frame>
        <draw:circle draw:style-name="gr2" draw:text-style-name="P1" draw:layer="layout" svg:width="0.2cm" svg:height="0.2cm" svg:x="47.301cm" svg:y="9.135cm">
          <text:p/>
        </draw:circle>
        <draw:frame draw:style-name="gr19" draw:text-style-name="P4" draw:layer="layout" svg:width="1.903cm" svg:height="1.471cm" svg:x="47.163cm" svg:y="8.001cm">
          <draw:text-box>
            <text:p text:style-name="P3"><text:span text:style-name="T1">BS</text:span><text:span text:style-name="T2">L</text:span></text:p>
          </draw:text-box>
        </draw:frame>
        <draw:circle draw:style-name="gr2" draw:text-style-name="P1" draw:layer="layout" svg:width="0.2cm" svg:height="0.2cm" svg:x="31.001cm" svg:y="10.546cm">
          <text:p/>
        </draw:circle>
        <draw:frame draw:style-name="gr20" draw:text-style-name="P2" draw:layer="layout" svg:width="1.565cm" svg:height="1.471cm" svg:x="29.965cm" svg:y="10.237cm">
          <draw:text-box>
            <text:p><text:span text:style-name="T1">IL</text:span><text:span text:style-name="T2">R</text:span></text:p>
          </draw:text-box>
        </draw:frame>
        <draw:circle draw:style-name="gr2" draw:text-style-name="P1" draw:layer="layout" svg:width="0.2cm" svg:height="0.2cm" svg:x="9.602cm" svg:y="10.547cm">
          <text:p/>
        </draw:circle>
        <draw:frame draw:style-name="gr11" draw:text-style-name="P2" draw:layer="layout" svg:width="1.628cm" svg:height="1.195cm" svg:x="9.567cm" svg:y="10.738cm">
          <draw:text-box>
            <text:p><text:span text:style-name="T1">TD</text:span></text:p>
          </draw:text-box>
        </draw:frame>
        <draw:circle draw:style-name="gr2" draw:text-style-name="P1" draw:layer="layout" svg:width="0.2cm" svg:height="0.2cm" svg:x="43.701cm" svg:y="10.546cm">
          <text:p/>
        </draw:circle>
        <draw:frame draw:style-name="gr21" draw:text-style-name="P2" draw:layer="layout" svg:width="1.484cm" svg:height="1.471cm" svg:x="43.765cm" svg:y="9.437cm">
          <draw:text-box>
            <text:p><text:span text:style-name="T1">IL</text:span><text:span text:style-name="T2">L</text:span></text:p>
          </draw:text-box>
        </draw:frame>
        <draw:circle draw:style-name="gr2" draw:text-style-name="P1" draw:layer="layout" svg:width="0.2cm" svg:height="0.2cm" svg:x="37.34cm" svg:y="10cm">
          <text:p/>
        </draw:circle>
        <draw:frame draw:style-name="gr12" draw:text-style-name="P4" draw:layer="layout" svg:width="1.535cm" svg:height="1.195cm" svg:x="37.4cm" svg:y="9.418cm">
          <draw:text-box>
            <text:p text:style-name="P3"><text:span text:style-name="T1">S3</text:span></text:p>
          </draw:text-box>
        </draw:frame>
        <draw:circle draw:style-name="gr2" draw:text-style-name="P1" draw:layer="layout" svg:width="0.2cm" svg:height="0.2cm" svg:x="32.502cm" svg:y="13.611cm">
          <text:p/>
        </draw:circle>
        <draw:frame draw:style-name="gr22" draw:text-style-name="P2" draw:layer="layout" svg:width="1.658cm" svg:height="1.471cm" svg:x="31.266cm" svg:y="13.202cm">
          <draw:text-box>
            <text:p><text:span text:style-name="T1">IS</text:span><text:span text:style-name="T2">R</text:span></text:p>
          </draw:text-box>
        </draw:frame>
        <draw:circle draw:style-name="gr2" draw:text-style-name="P1" draw:layer="layout" svg:width="0.2cm" svg:height="0.2cm" svg:x="42.102cm" svg:y="13.611cm">
          <text:p/>
        </draw:circle>
        <draw:frame draw:style-name="gr23" draw:text-style-name="P2" draw:layer="layout" svg:width="1.577cm" svg:height="1.471cm" svg:x="42.266cm" svg:y="13.102cm">
          <draw:text-box>
            <text:p><text:span text:style-name="T1">IS</text:span><text:span text:style-name="T2">L</text:span></text:p>
          </draw:text-box>
        </draw:frame>
        <draw:circle draw:style-name="gr2" draw:text-style-name="P1" draw:layer="layout" svg:width="0.2cm" svg:height="0.2cm" svg:x="37.378cm" svg:y="15.934cm">
          <text:p/>
        </draw:circle>
        <draw:frame draw:style-name="gr8" draw:text-style-name="P2" draw:layer="layout" svg:width="2.191cm" svg:height="1.195cm" svg:x="35.968cm" svg:y="16.1cm">
          <draw:text-box>
            <text:p><text:span text:style-name="T1">PSA</text:span></text:p>
          </draw:text-box>
        </draw:frame>
        <draw:circle draw:style-name="gr2" draw:text-style-name="P1" draw:layer="layout" svg:width="0.2cm" svg:height="0.2cm" svg:x="37.377cm" svg:y="15.2cm">
          <text:p/>
        </draw:circle>
        <draw:frame draw:style-name="gr5" draw:text-style-name="P2" draw:layer="layout" svg:width="1.488cm" svg:height="1.195cm" svg:x="37.338cm" svg:y="14.466cm">
          <draw:text-box>
            <text:p><text:span text:style-name="T1">SJ</text:span></text:p>
          </draw:text-box>
        </draw:frame>
        <draw:circle draw:style-name="gr2" draw:text-style-name="P1" draw:layer="layout" svg:width="0.2cm" svg:height="0.2cm" svg:x="37.35cm" svg:y="18.81cm">
          <text:p/>
        </draw:circle>
        <draw:frame draw:style-name="gr9" draw:text-style-name="P2" draw:layer="layout" svg:width="1.865cm" svg:height="1.195cm" svg:x="37.43cm" svg:y="18.077cm">
          <draw:text-box>
            <text:p><text:span text:style-name="T1">PSI</text:span></text:p>
          </draw:text-box>
        </draw:frame>
        <draw:line draw:style-name="gr13" draw:text-style-name="P1" draw:layer="layout" svg:x1="43.8cm" svg:y1="10.65cm" svg:x2="31cm" svg:y2="10.65cm">
          <text:p/>
        </draw:line>
        <draw:frame draw:style-name="gr11" draw:text-style-name="P2" draw:layer="layout" svg:width="1.628cm" svg:height="1.195cm" svg:x="41.2cm" svg:y="9.718cm">
          <draw:text-box>
            <text:p><text:span text:style-name="T1">TD</text:span></text:p>
          </draw:text-box>
        </draw:frame>
        <draw:line draw:style-name="gr13" draw:text-style-name="P1" draw:layer="layout" svg:x1="42.3cm" svg:y1="13.7cm" svg:x2="32.6cm" svg:y2="13.71cm">
          <text:p/>
        </draw:line>
        <draw:frame draw:style-name="gr14" draw:text-style-name="P2" draw:layer="layout" svg:width="1.912cm" svg:height="1.195cm" svg:x="40.301cm" svg:y="12.818cm">
          <draw:text-box>
            <text:p><text:span text:style-name="T1">DIS</text:span></text:p>
          </draw:text-box>
        </draw:frame>
        <draw:line draw:style-name="gr13" draw:text-style-name="P1" draw:layer="layout" svg:x1="47.4cm" svg:y1="9.25cm" svg:x2="27.4cm" svg:y2="9.3cm">
          <text:p/>
        </draw:line>
        <draw:line draw:style-name="gr13" draw:text-style-name="P1" draw:layer="layout" svg:x1="49.6cm" svg:y1="3.21cm" svg:x2="25.1cm" svg:y2="3.2cm">
          <text:p/>
        </draw:line>
        <draw:frame draw:style-name="gr24" draw:text-style-name="P2" draw:layer="layout" svg:width="2.238cm" svg:height="1.195cm" svg:x="40.301cm" svg:y="8.118cm">
          <draw:text-box>
            <text:p><text:span text:style-name="T1">DBS</text:span></text:p>
          </draw:text-box>
        </draw:frame>
        <draw:frame draw:style-name="gr25" draw:text-style-name="P2" draw:layer="layout" svg:width="2.284cm" svg:height="1.195cm" svg:x="39.401cm" svg:y="2.018cm">
          <draw:text-box>
            <text:p><text:span text:style-name="T1">DBC</text:span></text:p>
          </draw:text-box>
        </draw:frame>
        <draw:circle draw:style-name="gr2" draw:text-style-name="P1" draw:layer="layout" svg:width="0.2cm" svg:height="0.2cm" svg:x="43.949cm" svg:y="20.246cm">
          <text:p/>
        </draw:circle>
        <draw:circle draw:style-name="gr2" draw:text-style-name="P1" draw:layer="layout" svg:width="0.2cm" svg:height="0.2cm" svg:x="31.049cm" svg:y="20.246cm">
          <text:p/>
        </draw:circle>
        <draw:circle draw:style-name="gr2" draw:text-style-name="P1" draw:layer="layout" svg:width="0.2cm" svg:height="0.2cm" svg:x="12.749cm" svg:y="20.346cm">
          <text:p/>
        </draw:circle>
        <draw:frame draw:style-name="gr7" draw:text-style-name="P2" draw:layer="layout" svg:width="1.256cm" svg:height="1.195cm" svg:x="11.561cm" svg:y="20.036cm">
          <draw:text-box>
            <text:p><text:span text:style-name="T1">TI</text:span></text:p>
          </draw:text-box>
        </draw:frame>
        <draw:frame draw:style-name="gr26" draw:text-style-name="P2" draw:layer="layout" svg:width="1.612cm" svg:height="1.471cm" svg:x="29.912cm" svg:y="19.836cm">
          <draw:text-box>
            <text:p><text:span text:style-name="T1">TI</text:span><text:span text:style-name="T2">R</text:span></text:p>
          </draw:text-box>
        </draw:frame>
        <draw:frame draw:style-name="gr27" draw:text-style-name="P2" draw:layer="layout" svg:width="1.531cm" svg:height="1.471cm" svg:x="44.113cm" svg:y="19.637cm">
          <draw:text-box>
            <text:p><text:span text:style-name="T1">TI</text:span><text:span text:style-name="T2">L</text:span></text:p>
          </draw:text-box>
        </draw:frame>
        <draw:circle draw:style-name="gr2" draw:text-style-name="P1" draw:layer="layout" svg:width="0.2cm" svg:height="0.2cm" svg:x="17.348cm" svg:y="15.345cm">
          <text:p/>
        </draw:circle>
        <draw:frame draw:style-name="gr11" draw:text-style-name="P2" draw:layer="layout" svg:width="1.628cm" svg:height="1.195cm" svg:x="17.512cm" svg:y="15.336cm">
          <draw:text-box>
            <text:p><text:span text:style-name="T1">SB</text:span></text:p>
          </draw:text-box>
        </draw:frame>
        <draw:frame draw:style-name="gr28" draw:text-style-name="P2" draw:layer="layout" svg:width="4.875cm" svg:height="1.195cm" draw:transform="rotate (1.18682389135592) translate (8.131cm 11.472cm)">
          <draw:text-box>
            <text:p><text:span text:style-name="T1">COV (APD)</text:span></text:p>
          </draw:text-box>
        </draw:frame>
        <draw:line draw:style-name="gr13" draw:text-style-name="P1" draw:layer="layout" svg:x1="5cm" svg:y1="16cm" svg:x2="17.5cm" svg:y2="15.5cm">
          <text:p/>
        </draw:line>
        <draw:frame draw:style-name="gr24" draw:text-style-name="P2" draw:layer="layout" svg:width="2.238cm" svg:height="1.195cm" draw:transform="rotate (0.05235987755982) translate (10.478cm 15.045cm)">
          <draw:text-box>
            <text:p><text:span text:style-name="T1">DSB</text:span></text:p>
          </draw:text-box>
        </draw:frame>
        <draw:frame draw:style-name="gr9" draw:text-style-name="P2" draw:layer="layout" svg:width="1.865cm" svg:height="1.195cm" svg:x="37.9cm" svg:y="19.418cm">
          <draw:text-box>
            <text:p><text:span text:style-name="T1">DTI</text:span></text:p>
          </draw:text-box>
        </draw:frame>
        <draw:line draw:style-name="gr13" draw:text-style-name="P1" draw:layer="layout" svg:x1="43.9cm" svg:y1="20.3cm" svg:x2="31.2cm" svg:y2="20.31cm">
          <text:p/>
        </draw:line>
        <draw:frame draw:style-name="gr24" draw:text-style-name="P2" draw:layer="layout" svg:width="2.238cm" svg:height="1.195cm" svg:x="39.638cm" svg:y="14.518cm">
          <draw:text-box>
            <text:p><text:span text:style-name="T1">DTR</text:span></text:p>
          </draw:text-box>
        </draw:frame>
        <draw:frame draw:style-name="gr1" draw:text-style-name="P1" draw:layer="layout" svg:width="25.111cm" svg:height="19.912cm" svg:x="0.001cm" svg:y="22.801cm">
          <draw:image xlink:href="../pelvimetry_bottom.png" xlink:type="simple" xlink:show="embed" xlink:actuate="onLoad">
            <text:p/>
          </draw:image>
        </draw:frame>
        <draw:frame draw:style-name="gr1" draw:text-style-name="P1" draw:layer="layout" svg:width="25.111cm" svg:height="19.912cm" svg:x="25.001cm" svg:y="22.801cm">
          <draw:image xlink:href="../pelvimetry_top.png" xlink:type="simple" xlink:show="embed" xlink:actuate="onLoad">
            <text:p/>
          </draw:image>
        </draw:frame>
        <draw:circle draw:style-name="gr2" draw:text-style-name="P1" draw:layer="layout" svg:width="0.2cm" svg:height="0.2cm" svg:x="27.602cm" svg:y="42.331cm">
          <text:p/>
        </draw:circle>
        <draw:frame draw:style-name="gr18" draw:text-style-name="P4" draw:layer="layout" svg:width="1.984cm" svg:height="1.471cm" svg:x="27.664cm" svg:y="41.097cm">
          <draw:text-box>
            <text:p text:style-name="P3"><text:span text:style-name="T1">BS</text:span><text:span text:style-name="T2">R</text:span></text:p>
          </draw:text-box>
        </draw:frame>
        <draw:circle draw:style-name="gr2" draw:text-style-name="P1" draw:layer="layout" svg:width="0.2cm" svg:height="0.2cm" svg:x="47.603cm" svg:y="42.332cm">
          <text:p/>
        </draw:circle>
        <draw:frame draw:style-name="gr19" draw:text-style-name="P4" draw:layer="layout" svg:width="1.903cm" svg:height="1.471cm" svg:x="47.665cm" svg:y="41.398cm">
          <draw:text-box>
            <text:p text:style-name="P3"><text:span text:style-name="T1">BS</text:span><text:span text:style-name="T2">L</text:span></text:p>
          </draw:text-box>
        </draw:frame>
        <draw:circle draw:style-name="gr2" draw:text-style-name="P1" draw:layer="layout" svg:width="0.2cm" svg:height="0.2cm" svg:x="31.103cm" svg:y="35.343cm">
          <text:p/>
        </draw:circle>
        <draw:frame draw:style-name="gr20" draw:text-style-name="P2" draw:layer="layout" svg:width="1.565cm" svg:height="1.471cm" svg:x="31.067cm" svg:y="35.634cm">
          <draw:text-box>
            <text:p><text:span text:style-name="T1">IL</text:span><text:span text:style-name="T2">R</text:span></text:p>
          </draw:text-box>
        </draw:frame>
        <draw:circle draw:style-name="gr2" draw:text-style-name="P1" draw:layer="layout" svg:width="0.2cm" svg:height="0.2cm" svg:x="43.803cm" svg:y="35.343cm">
          <text:p/>
        </draw:circle>
        <draw:frame draw:style-name="gr21" draw:text-style-name="P2" draw:layer="layout" svg:width="1.484cm" svg:height="1.471cm" svg:x="43.767cm" svg:y="35.634cm">
          <draw:text-box>
            <text:p><text:span text:style-name="T1">IL</text:span><text:span text:style-name="T2">L</text:span></text:p>
          </draw:text-box>
        </draw:frame>
        <draw:circle draw:style-name="gr2" draw:text-style-name="P1" draw:layer="layout" svg:width="0.2cm" svg:height="0.2cm" svg:x="37.48cm" svg:y="41.731cm">
          <text:p/>
        </draw:circle>
        <draw:frame draw:style-name="gr8" draw:text-style-name="P2" draw:layer="layout" svg:width="2.191cm" svg:height="1.195cm" svg:x="36.07cm" svg:y="40.797cm">
          <draw:text-box>
            <text:p><text:span text:style-name="T1">PSA</text:span></text:p>
          </draw:text-box>
        </draw:frame>
        <draw:circle draw:style-name="gr2" draw:text-style-name="P1" draw:layer="layout" svg:width="0.2cm" svg:height="0.2cm" svg:x="37.452cm" svg:y="37.707cm">
          <text:p/>
        </draw:circle>
        <draw:frame draw:style-name="gr9" draw:text-style-name="P2" draw:layer="layout" svg:width="1.865cm" svg:height="1.195cm" svg:x="37.532cm" svg:y="36.974cm">
          <draw:text-box>
            <text:p><text:span text:style-name="T1">PSI</text:span></text:p>
          </draw:text-box>
        </draw:frame>
        <draw:line draw:style-name="gr13" draw:text-style-name="P1" draw:layer="layout" svg:x1="43.902cm" svg:y1="35.447cm" svg:x2="31.102cm" svg:y2="35.447cm">
          <text:p/>
        </draw:line>
        <draw:frame draw:style-name="gr11" draw:text-style-name="P2" draw:layer="layout" svg:width="1.628cm" svg:height="1.195cm" svg:x="38.402cm" svg:y="35.515cm">
          <draw:text-box>
            <text:p><text:span text:style-name="T1">TD</text:span></text:p>
          </draw:text-box>
        </draw:frame>
        <draw:line draw:style-name="gr13" draw:text-style-name="P1" draw:layer="layout" svg:x1="47.702cm" svg:y1="42.447cm" svg:x2="27.702cm" svg:y2="42.497cm">
          <text:p/>
        </draw:line>
        <draw:frame draw:style-name="gr24" draw:text-style-name="P2" draw:layer="layout" svg:width="2.238cm" svg:height="1.195cm" svg:x="40.603cm" svg:y="41.415cm">
          <draw:text-box>
            <text:p><text:span text:style-name="T1">DBS</text:span></text:p>
          </draw:text-box>
        </draw:frame>
        <draw:circle draw:style-name="gr2" draw:text-style-name="P1" draw:layer="layout" svg:width="0.2cm" svg:height="0.2cm" svg:x="37.472cm" svg:y="25.75cm">
          <text:p/>
        </draw:circle>
        <draw:frame draw:style-name="gr15" draw:text-style-name="P2" draw:layer="layout" svg:width="1.442cm" svg:height="1.195cm" svg:x="37.674cm" svg:y="25.397cm">
          <draw:text-box>
            <text:p><text:span text:style-name="T1">L5</text:span></text:p>
          </draw:text-box>
        </draw:frame>
        <draw:circle draw:style-name="gr2" draw:text-style-name="P1" draw:layer="layout" svg:width="0.2cm" svg:height="0.2cm" svg:x="37.48cm" svg:y="40.031cm">
          <text:p/>
        </draw:circle>
        <draw:frame draw:style-name="gr8" draw:text-style-name="P2" draw:layer="layout" svg:width="2.191cm" svg:height="1.195cm" svg:x="36.07cm" svg:y="39.097cm">
          <draw:text-box>
            <text:p><text:span text:style-name="T1">PSP</text:span></text:p>
          </draw:text-box>
        </draw:frame>
        <draw:circle draw:style-name="gr2" draw:text-style-name="P1" draw:layer="layout" svg:width="0.2cm" svg:height="0.2cm" svg:x="2.503cm" svg:y="42.332cm">
          <text:p/>
        </draw:circle>
        <draw:frame draw:style-name="gr19" draw:text-style-name="P4" draw:layer="layout" svg:width="1.903cm" svg:height="1.471cm" svg:x="2.565cm" svg:y="41.098cm">
          <draw:text-box>
            <text:p text:style-name="P3"><text:span text:style-name="T1">BS</text:span><text:span text:style-name="T2">L</text:span></text:p>
          </draw:text-box>
        </draw:frame>
        <draw:circle draw:style-name="gr2" draw:text-style-name="P1" draw:layer="layout" svg:width="0.2cm" svg:height="0.2cm" svg:x="22.504cm" svg:y="42.333cm">
          <text:p/>
        </draw:circle>
        <draw:frame draw:style-name="gr18" draw:text-style-name="P4" draw:layer="layout" svg:width="1.984cm" svg:height="1.471cm" svg:x="22.566cm" svg:y="41.599cm">
          <draw:text-box>
            <text:p text:style-name="P3"><text:span text:style-name="T1">BS</text:span><text:span text:style-name="T2">R</text:span></text:p>
          </draw:text-box>
        </draw:frame>
        <draw:line draw:style-name="gr13" draw:text-style-name="P1" draw:layer="layout" svg:x1="22.603cm" svg:y1="42.448cm" svg:x2="2.603cm" svg:y2="42.498cm">
          <text:p/>
        </draw:line>
        <draw:frame draw:style-name="gr24" draw:text-style-name="P2" draw:layer="layout" svg:width="2.238cm" svg:height="1.195cm" svg:x="15.504cm" svg:y="41.316cm">
          <draw:text-box>
            <text:p><text:span text:style-name="T1">DBS</text:span></text:p>
          </draw:text-box>
        </draw:frame>
        <draw:circle draw:style-name="gr2" draw:text-style-name="P1" draw:layer="layout" svg:width="0.2cm" svg:height="0.2cm" svg:x="12.409cm" svg:y="37.607cm">
          <text:p/>
        </draw:circle>
        <draw:frame draw:style-name="gr9" draw:text-style-name="P2" draw:layer="layout" svg:width="1.865cm" svg:height="1.195cm" svg:x="12.489cm" svg:y="36.874cm">
          <draw:text-box>
            <text:p><text:span text:style-name="T1">PSI</text:span></text:p>
          </draw:text-box>
        </draw:frame>
        <draw:circle draw:style-name="gr2" draw:text-style-name="P1" draw:layer="layout" svg:width="0.2cm" svg:height="0.2cm" svg:x="12.479cm" svg:y="41.749cm">
          <text:p/>
        </draw:circle>
        <draw:frame draw:style-name="gr8" draw:text-style-name="P2" draw:layer="layout" svg:width="2.191cm" svg:height="1.195cm" svg:x="11.069cm" svg:y="40.715cm">
          <draw:text-box>
            <text:p><text:span text:style-name="T1">PSA</text:span></text:p>
          </draw:text-box>
        </draw:frame>
        <draw:frame draw:style-name="gr4" draw:text-style-name="P2" draw:layer="layout" svg:width="1.675cm" svg:height="1.195cm" svg:x="12.901cm" svg:y="33.615cm">
          <draw:text-box>
            <text:p><text:span text:style-name="T1">PR</text:span></text:p>
          </draw:text-box>
        </draw:frame>
        <draw:circle draw:style-name="gr2" draw:text-style-name="P1" draw:layer="layout" svg:width="0.2cm" svg:height="0.2cm" svg:x="12.451cm" svg:y="34.124cm">
          <text:p/>
        </draw:circle>
        <draw:circle draw:style-name="gr2" draw:text-style-name="P1" draw:layer="layout" svg:width="0.2cm" svg:height="0.2cm" svg:x="7.704cm" svg:y="28.608cm">
          <text:p/>
        </draw:circle>
        <draw:frame draw:style-name="gr23" draw:text-style-name="P2" draw:layer="layout" svg:width="1.577cm" svg:height="1.471cm" svg:x="6.868cm" svg:y="28.699cm">
          <draw:text-box>
            <text:p><text:span text:style-name="T1">IS</text:span><text:span text:style-name="T2">L</text:span></text:p>
          </draw:text-box>
        </draw:frame>
        <draw:circle draw:style-name="gr2" draw:text-style-name="P1" draw:layer="layout" svg:width="0.2cm" svg:height="0.2cm" svg:x="17.304cm" svg:y="28.608cm">
          <text:p/>
        </draw:circle>
        <draw:frame draw:style-name="gr22" draw:text-style-name="P2" draw:layer="layout" svg:width="1.658cm" svg:height="1.471cm" svg:x="17.268cm" svg:y="28.899cm">
          <draw:text-box>
            <text:p><text:span text:style-name="T1">IS</text:span><text:span text:style-name="T2">R</text:span></text:p>
          </draw:text-box>
        </draw:frame>
        <draw:line draw:style-name="gr13" draw:text-style-name="P1" draw:layer="layout" svg:x1="17.502cm" svg:y1="28.697cm" svg:x2="7.802cm" svg:y2="28.707cm">
          <text:p/>
        </draw:line>
        <draw:frame draw:style-name="gr14" draw:text-style-name="P2" draw:layer="layout" svg:width="1.912cm" svg:height="1.195cm" svg:x="15.003cm" svg:y="27.615cm">
          <draw:text-box>
            <text:p><text:span text:style-name="T1">DIS</text:span></text:p>
          </draw:text-box>
        </draw:frame>
        <draw:circle draw:style-name="gr2" draw:text-style-name="P1" draw:layer="layout" svg:width="0.2cm" svg:height="0.2cm" svg:x="18.85cm" svg:y="30.743cm">
          <text:p/>
        </draw:circle>
        <draw:circle draw:style-name="gr2" draw:text-style-name="P1" draw:layer="layout" svg:width="0.2cm" svg:height="0.2cm" svg:x="6.25cm" svg:y="30.743cm">
          <text:p/>
        </draw:circle>
        <draw:frame draw:style-name="gr27" draw:text-style-name="P2" draw:layer="layout" svg:width="1.531cm" svg:height="1.471cm" svg:x="6.414cm" svg:y="30.934cm">
          <draw:text-box>
            <text:p><text:span text:style-name="T1">TI</text:span><text:span text:style-name="T2">L</text:span></text:p>
          </draw:text-box>
        </draw:frame>
        <draw:frame draw:style-name="gr26" draw:text-style-name="P2" draw:layer="layout" svg:width="1.612cm" svg:height="1.471cm" svg:x="17.914cm" svg:y="30.934cm">
          <draw:text-box>
            <text:p><text:span text:style-name="T1">TI</text:span><text:span text:style-name="T2">R</text:span></text:p>
          </draw:text-box>
        </draw:frame>
        <draw:circle draw:style-name="gr2" draw:text-style-name="P1" draw:layer="layout" svg:width="0.2cm" svg:height="0.2cm" svg:x="33.006cm" svg:y="24.634cm">
          <text:p/>
        </draw:circle>
        <draw:frame draw:style-name="gr29" draw:text-style-name="P4" draw:layer="layout" svg:width="2.784cm" svg:height="1.471cm" svg:x="33.068cm" svg:y="23.4cm">
          <draw:text-box>
            <text:p text:style-name="P3"><text:span text:style-name="T1">PSIS</text:span><text:span text:style-name="T2">R</text:span></text:p>
          </draw:text-box>
        </draw:frame>
        <draw:circle draw:style-name="gr2" draw:text-style-name="P1" draw:layer="layout" svg:width="0.2cm" svg:height="0.2cm" svg:x="16.706cm" svg:y="24.634cm">
          <text:p/>
        </draw:circle>
        <draw:frame draw:style-name="gr29" draw:text-style-name="P4" draw:layer="layout" svg:width="2.784cm" svg:height="1.471cm" svg:x="16.768cm" svg:y="23.5cm">
          <draw:text-box>
            <text:p text:style-name="P3"><text:span text:style-name="T1">PSIS</text:span><text:span text:style-name="T2">R</text:span></text:p>
          </draw:text-box>
        </draw:frame>
        <draw:circle draw:style-name="gr2" draw:text-style-name="P1" draw:layer="layout" svg:width="0.2cm" svg:height="0.2cm" svg:x="8.106cm" svg:y="24.634cm">
          <text:p/>
        </draw:circle>
        <draw:frame draw:style-name="gr30" draw:text-style-name="P4" draw:layer="layout" svg:width="2.703cm" svg:height="1.471cm" svg:x="6.668cm" svg:y="23.3cm">
          <draw:text-box>
            <text:p text:style-name="P3"><text:span text:style-name="T1">PSIS</text:span><text:span text:style-name="T2">L</text:span></text:p>
          </draw:text-box>
        </draw:frame>
        <draw:circle draw:style-name="gr2" draw:text-style-name="P1" draw:layer="layout" svg:width="0.2cm" svg:height="0.2cm" svg:x="41.807cm" svg:y="24.634cm">
          <text:p/>
        </draw:circle>
        <draw:frame draw:style-name="gr30" draw:text-style-name="P4" draw:layer="layout" svg:width="2.703cm" svg:height="1.471cm" svg:x="41.869cm" svg:y="23.9cm">
          <draw:text-box>
            <text:p text:style-name="P3"><text:span text:style-name="T1">PSIS</text:span><text:span text:style-name="T2">L</text:span></text:p>
          </draw:text-box>
        </draw:frame>
        <draw:circle draw:style-name="gr2" draw:text-style-name="P1" draw:layer="layout" svg:width="0.2cm" svg:height="0.2cm" svg:x="25.102cm" svg:y="37.931cm">
          <text:p/>
        </draw:circle>
        <draw:frame draw:style-name="gr16" draw:text-style-name="P4" draw:layer="layout" svg:width="2.031cm" svg:height="1.471cm" svg:x="25.164cm" svg:y="36.997cm">
          <draw:text-box>
            <text:p text:style-name="P3"><text:span text:style-name="T1">BC</text:span><text:span text:style-name="T2">R</text:span></text:p>
          </draw:text-box>
        </draw:frame>
        <draw:circle draw:style-name="gr2" draw:text-style-name="P1" draw:layer="layout" svg:width="0.2cm" svg:height="0.2cm" svg:x="49.703cm" svg:y="37.931cm">
          <text:p/>
        </draw:circle>
        <draw:frame draw:style-name="gr17" draw:text-style-name="P4" draw:layer="layout" svg:width="1.95cm" svg:height="1.471cm" svg:x="48.465cm" svg:y="36.497cm">
          <draw:text-box>
            <text:p text:style-name="P3"><text:span text:style-name="T1">BC</text:span><text:span text:style-name="T2">L</text:span></text:p>
          </draw:text-box>
        </draw:frame>
        <draw:line draw:style-name="gr13" draw:text-style-name="P1" draw:layer="layout" svg:x1="49.801cm" svg:y1="38.007cm" svg:x2="25.301cm" svg:y2="37.997cm">
          <text:p/>
        </draw:line>
        <draw:frame draw:style-name="gr25" draw:text-style-name="P2" draw:layer="layout" svg:width="2.284cm" svg:height="1.195cm" svg:x="39.702cm" svg:y="36.915cm">
          <draw:text-box>
            <text:p><text:span text:style-name="T1">DBC</text:span></text:p>
          </draw:text-box>
        </draw:frame>
        <draw:line draw:style-name="gr13" draw:text-style-name="P1" draw:layer="layout" svg:x1="18.901cm" svg:y1="30.847cm" svg:x2="6.401cm" svg:y2="30.857cm">
          <text:p/>
        </draw:line>
        <draw:frame draw:style-name="gr9" draw:text-style-name="P2" draw:layer="layout" svg:width="1.865cm" svg:height="1.195cm" svg:x="14.103cm" svg:y="29.715cm">
          <draw:text-box>
            <text:p><text:span text:style-name="T1">DTI</text:span></text:p>
          </draw:text-box>
        </draw:frame>
        <draw:line draw:style-name="gr13" draw:text-style-name="P1" draw:layer="layout" svg:x1="16.801cm" svg:y1="24.747cm" svg:x2="8.101cm" svg:y2="24.757cm">
          <text:p/>
        </draw:line>
        <draw:frame draw:style-name="gr3" draw:text-style-name="P4" draw:layer="layout" svg:width="3.038cm" svg:height="1.195cm" svg:x="13.268cm" svg:y="23.6cm">
          <draw:text-box>
            <text:p text:style-name="P3"><text:span text:style-name="T1">DPSIS</text:span></text:p>
          </draw:text-box>
        </draw:frame>
        <draw:line draw:style-name="gr13" draw:text-style-name="P1" draw:layer="layout" svg:x1="41.901cm" svg:y1="24.747cm" svg:x2="33.201cm" svg:y2="24.757cm">
          <text:p/>
        </draw:line>
        <draw:frame draw:style-name="gr3" draw:text-style-name="P4" draw:layer="layout" svg:width="3.038cm" svg:height="1.195cm" svg:x="37.769cm" svg:y="23.6cm">
          <draw:text-box>
            <text:p text:style-name="P3"><text:span text:style-name="T1">DPSIS</text:span></text:p>
          </draw:text-box>
        </draw:frame>
        <draw:circle draw:style-name="gr2" draw:text-style-name="P1" draw:layer="layout" svg:width="0.2cm" svg:height="0.2cm" svg:x="31.344cm" svg:y="33.006cm">
          <text:p/>
        </draw:circle>
        <draw:frame draw:style-name="gr18" draw:text-style-name="P2" draw:layer="layout" svg:width="1.984cm" svg:height="1.471cm" svg:x="31.308cm" svg:y="32.197cm">
          <draw:text-box>
            <text:p><text:span text:style-name="T1">SA</text:span><text:span text:style-name="T2">R</text:span></text:p>
          </draw:text-box>
        </draw:frame>
        <draw:circle draw:style-name="gr2" draw:text-style-name="P1" draw:layer="layout" svg:width="0.2cm" svg:height="0.2cm" svg:x="43.599cm" svg:y="33.006cm">
          <text:p/>
        </draw:circle>
        <draw:frame draw:style-name="gr19" draw:text-style-name="P2" draw:layer="layout" svg:width="1.903cm" svg:height="1.471cm" svg:x="43.563cm" svg:y="32.197cm">
          <draw:text-box>
            <text:p><text:span text:style-name="T1">SA</text:span><text:span text:style-name="T2">L</text:span></text:p>
          </draw:text-box>
        </draw:frame>
        <draw:line draw:style-name="gr13" draw:text-style-name="P1" draw:layer="layout" svg:x1="43.601cm" svg:y1="33.111cm" svg:x2="31.501cm" svg:y2="33.111cm">
          <text:p/>
        </draw:line>
        <draw:frame draw:style-name="gr24" draw:text-style-name="P2" draw:layer="layout" svg:width="2.238cm" svg:height="1.195cm" svg:x="38.839cm" svg:y="32.261cm">
          <draw:text-box>
            <text:p><text:span text:style-name="T1">DSA</text:span></text:p>
          </draw:text-box>
        </draw:frame>
        <draw:circle draw:style-name="gr2" draw:text-style-name="P1" draw:layer="layout" svg:width="0.2cm" svg:height="0.2cm" svg:x="25.002cm" svg:y="35.331cm">
          <text:p/>
        </draw:circle>
        <draw:frame draw:style-name="gr24" draw:text-style-name="P2" draw:layer="layout" svg:width="2.238cm" svg:height="1.195cm" svg:x="15.001cm" svg:y="34.215cm">
          <draw:text-box>
            <text:p><text:span text:style-name="T1">DT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11cm" fo:page-height="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děk Hynčík</meta:initial-creator>
    <meta:creation-date>2020-10-26T11:49:04.50</meta:creation-date>
    <dc:date>2026-06-15T13:33:48.61</dc:date>
    <dc:creator>Luděk Hynčík</dc:creator>
    <meta:editing-duration>PT20H19M47S</meta:editing-duration>
    <meta:editing-cycles>78</meta:editing-cycles>
    <meta:generator>OpenOffice/4.1.15$Win32 OpenOffice.org_project/4115m2$Build-9813</meta:generator>
    <meta:document-statistic meta:object-count="153"/>
  </office:meta>
</office:document-meta>
</file>